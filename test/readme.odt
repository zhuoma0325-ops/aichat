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start" style:justify-single-word="false"/>
      <style:text-properties officeooo:paragraph-rsid="00129177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 style:list-style-name="L16"/>
    <style:style style:name="P4" style:family="paragraph" style:parent-style-name="Preformatted_20_Text" style:list-style-name="L16">
      <style:paragraph-properties fo:margin-top="0cm" fo:margin-bottom="0.499cm" style:contextual-spacing="fals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paragraph-properties fo:margin-left="1cm" fo:margin-right="1cm" fo:text-indent="0cm" style:auto-text-indent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>
      <style:paragraph-properties fo:text-align="start" style:justify-single-word="false"/>
      <style:text-properties officeooo:paragraph-rsid="00129177"/>
    </style:style>
    <style:style style:name="P25" style:family="paragraph" style:parent-style-name="Text_20_body">
      <style:paragraph-properties fo:text-align="start" style:justify-single-word="false"/>
      <style:text-properties officeooo:paragraph-rsid="001518b6"/>
    </style:style>
    <style:style style:name="T1" style:family="text">
      <style:text-properties officeooo:rsid="00148be6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6095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SP32 智能语音助手项目总结</text:h>
      <text:p text:style-name="P24"/>
      <text:p text:style-name="P24">一、项目简介</text:p>
      <text:p text:style-name="P24"/>
      <text:p text:style-name="P24">本项目是基于 ESP32-S3 搭建的离线语音采集+云端 AI 语音交互系统，实现了语音唤醒、自然语言问答、环境温湿度查询功能，最终可通过扬声器完成语音结果回复，是物联网与本地大语言模型结合的低成本实践方案。</text:p>
      <text:p text:style-name="P24"/>
      <text:p text:style-name="P24">二、硬件组成</text:p>
      <text:p text:style-name="P24"/>
      <text:p text:style-name="P24">项目采用模块化硬件设计，核心组件及参数如下：</text:p>
      <text:p text:style-name="P24"/>
      <text:p text:style-name="P24">- 主控芯片：ESP32-S3 N16R8，配备 16MB Flash 与 8MB PSRAM，满足音频缓存与网络通信的资源需求</text:p>
      <text:p text:style-name="P24">- 语音采集：INMP441 I2S 数字 MEMS 麦克风，提供清晰稳定的语音输入</text:p>
      <text:p text:style-name="P24">- 音频输出：MAX98357A I2S 输入 D 类功放，搭配 4Ω / 3W 喇叭实现语音播放</text:p>
      <text:p text:style-name="P24">- 环境传感：DHT22 温湿度传感器，支持环境参数采集查询</text:p>
      <text:p text:style-name="P24"/>
      <text:p text:style-name="P24">三、核心功能实现</text:p>
      <text:p text:style-name="P24"/>
      <text:p text:style-name="P24">项目完成了全链路语音交互闭环，各核心功能如下：</text:p>
      <text:p text:style-name="P24"/>
      <text:p text:style-name="P24">1. 语音活动检测（VAD）：持续采集环境音频，自动判断语音的起始与结束，无需手动按键触发，实现无干预交互。</text:p>
      <text:p text:style-name="P24">2. 关键词唤醒：本地支持识别“小物”“嘿小物”“小物小物”三个唤醒词，识别成功后直接播放预设欢迎语，无需调用AI模型，响应速度快。</text:p>
      <text:p text:style-name="P24">3. 语音识别与理解：采集完成的录音通过 Wi-Fi 上传至本地 Flask 服务器，由 faster-whisper 完成语音转文字。</text:p>
      <text:p text:style-name="P24">4. 温湿度专项查询：当用户提问包含“温度”关键词时，系统直接读取 DHT22 采集的实时数据，生成专属语音回复。</text:p>
      <text:p text:style-name="P24">5. 通用AI对话：除唤醒与温湿度查询外的问题，转发至本地 Ollama 部署的 qwen2.5:1.5b 大模型生成回答，再由语音合成模块输出。</text:p>
      <text:p text:style-name="P24"><text:soft-page-break/>6. 语音合成播放：采用 Microsoft Edge TTS 生成 24kHz 单声道 PCM WAV 音频，ESP32 通过 I2S 接口实时输出至功放与扬声器，实现流畅播放。</text:p>
      <text:p text:style-name="P24"/>
      <text:p text:style-name="P24">四、系统架构</text:p>
      <text:p text:style-name="P24"/>
      <text:p text:style-name="P24"/>
      <text:p text:style-name="P24">ESP32 <text:s/>──(WiFi)──&gt; <text:s/>Flask 服务端 <text:s/>──&gt; <text:s/>Ollama</text:p>
      <text:p text:style-name="P24"><text:s text:c="2"/>│ <text:s text:c="20"/>│</text:p>
      <text:p text:style-name="P24"><text:s text:c="2"/>├─ INMP441 录音 <text:s text:c="6"/>├─ /asr (faster-whisper语音转写)</text:p>
      <text:p text:style-name="P24"><text:s text:c="2"/>├─ MAX98357A 播放 <text:s text:c="4"/>├─ /ask (Ollama大模型推理)</text:p>
      <text:p text:style-name="P24"><text:s text:c="2"/>└─ DHT22 传感器 <text:s text:c="6"/>├─ /wakeup (固定唤醒欢迎语TTS)</text:p>
      <text:p text:style-name="P24"><text:s text:c="25"/>└─ /temperature (温湿度结果TTS)</text:p>
      <text:p text:style-name="P24"> </text:p>
      <text:p text:style-name="P24"/>
      <text:p text:style-name="P24">ESP32 仅负责外设采集与音频播放，所有AI计算任务下沉至本地服务器，在有限的硬件资源下实现了完整的智能语音交互。</text:p>
      <text:p text:style-name="P24"/>
      <text:p text:style-name="P24">五、开发环境与依赖</text:p>
      <text:p text:style-name="P24"/>
      <text:p text:style-name="P24">ESP32 固件开发：基于 PlatformIO + Arduino 框架，依赖 audio-tools、ArduinoJson、DHT sensor library 三个核心库</text:p>
      <text:p text:style-name="P25">后端服务开发：基于 Python 3 + Flask 框架，依赖 faster-whisper、edge-tts、pydub、requests 工具包</text:p>
      <text:p text:style-name="P24">AI模型部署：通过 Ollama 本地部署 qwen2.5:1.5b 大模型</text:p>
      <text:p text:style-name="P24">开发操作系统：Ubuntu，编译与运行稳定性更佳</text:p>
      <text:p text:style-name="P24"/>
      <text:p text:style-name="P24">六、快速开始步骤</text:p>
      <text:p text:style-name="P24"/>
      <text:p text:style-name="P24">1. 硬件接线：</text:p>
      <text:p text:style-name="P24">播放I2S：BCLK=GPIO15, LRC=GPIO16, DIN=GPIO17, SD=GPIO11</text:p>
      <text:p text:style-name="P25"><text:s/>录音I2S：BCLK=GPIO4, LRC=GPIO5, DOUT=GPIO18</text:p>
      <text:p text:style-name="P24"><text:s/>DHT22：DATA=GPIO6，需外接上拉电阻</text:p>
      <text:p text:style-name="P24"><text:soft-page-break/>2. 启动后端服务：执行以下命令安装依赖并启动服务：</text:p>
      <text:p text:style-name="P24"/>
      <text:p text:style-name="P24"/>
      <text:p text:style-name="P24">pip install edge-tts pydub flask faster-whisper</text:p>
      <text:p text:style-name="P24">ollama pull qwen2.5:1.5b</text:p>
      <text:p text:style-name="P24">python app.py</text:p>
      <text:p text:style-name="P24"> </text:p>
      <text:p text:style-name="P24"/>
      <text:p text:style-name="P24">3. 编译烧录固件：修改  main.cpp  中的 Wi-Fi 信息与服务器IP地址，通过 PlatformIO 完成编译后上传至ESP32即可运行。</text:p>
      <text:p text:style-name="P24"/>
      <text:p text:style-name="P24">七、问题与解决方案</text:p>
      <text:p text:style-name="P24"/>
      <text:p text:style-name="P24">项目开发过程中遇到的典型问题及对应方案如下：</text:p>
      <text:p text:style-name="P24"/>
      <text:p text:style-name="P24">- 启动看门狗复位问题：调整  platformio.ini  中  board_build.psram_type  配置为  qio  即可解决</text:p>
      <text:p text:style-name="P24">- 长音频播放失败：服务端限制大模型回答最大 tokens 为80，同时ESP32采用流式播放分段加载解决内存不足问题</text:p>
      <text:p text:style-name="P24">- 语音识别率低：建议用户靠近麦克风说话，同时服务端开启VAD过滤静音段提升识别质量</text:p>
      <text:p text:style-name="P24"/>
      <text:p text:style-name="P24">八、项目文件结构</text:p>
      <text:p text:style-name="P24"/>
      <text:p text:style-name="P24"> src/main.cpp ：ESP32 端主程序，负责外设控制与网络通信</text:p>
      <text:p text:style-name="P24"> serv.py ：Flask 后端服务主程序，实现ASR、TTS与大模型调用</text:p>
      <text:p text:style-name="P24">platformio.ini ：PlatformIO 平台配置文件，包含硬件与编译参数配置</text:p>
      <text:p text:style-name="P24"/>
      <text:p text:style-name="P24">九.项目展望</text:p>
      <text:p text:style-name="P24"><text:span text:style-name="T3">1.</text:span>在唤醒词准确性层面，可通过两种路径优化：若使用通用唤醒词，直接移植“小智”等开源预训练唤醒模型，准确率远高于原生匹配方案，适配成本低；若需个性化唤醒词，可借助Edge Impulse采集样本自定义训练，导出模型后直接烧录ESP32即可。</text:p>
      <text:p text:style-name="P24"/>
      <text:p text:style-name="P24"><text:soft-page-break/><text:span text:style-name="T3">2.</text:span>针对大模型回答Token过大导致的播放截断问题，可启用ESP32-S3自带的PSRAM作为环形音频缓冲区，搭配服务端流式输出实现流式播放，无需限制回答长度，无需额外增加硬件成本，仅靠软件优化就大幅提升了项目实用性。</text:p>
      <text:p text:style-name="P24">本项目通过软硬协同设计，在低成本硬件上实现了接近成品的智能语音交互体验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CJK SC1" style:font-family-complex="'Noto Sans CJK S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09:23:03.976900597</meta:creation-date>
    <dc:date>2026-05-05T10:09:51.233641450</dc:date>
    <meta:editing-duration>PT2M59S</meta:editing-duration>
    <meta:editing-cycles>1</meta:editing-cycles>
    <meta:document-statistic meta:table-count="0" meta:image-count="0" meta:object-count="0" meta:page-count="4" meta:paragraph-count="55" meta:word-count="1362" meta:character-count="2259" meta:non-whitespace-character-count="2030"/>
    <meta:generator>LibreOffice/24.2.7.2$Linux_X86_64 LibreOffice_project/420$Build-2</meta:generator>
  </office:meta>
</office:document-meta>
</file>